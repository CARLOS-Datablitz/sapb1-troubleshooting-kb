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90%" style:font-name="JetBrainsMono NF" fo:font-size="8pt" fo:letter-spacing="normal" fo:font-style="normal" fo:font-weight="bold" style:font-size-asian="8pt" style:font-size-complex="8pt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loext:opacity="90%" style:font-name="JetBrainsMono NF" fo:font-size="8pt" fo:letter-spacing="normal" fo:font-style="normal" fo:font-weight="normal" style:font-size-asian="8pt" style:font-size-complex="8pt" loext:padding="0cm" loext:border="none"/>
    </style:style>
    <style:style style:name="P3" style:family="paragraph" style:parent-style-name="Horizontal_20_Line">
      <style:paragraph-properties fo:line-height="100%" fo:text-align="start" style:justify-single-word="false"/>
      <style:text-properties style:font-name="JetBrainsMono NF" fo:font-size="8pt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loext:opacity="90%" style:font-name="JetBrainsMono NF" fo:font-size="8pt" fo:letter-spacing="normal" fo:font-style="normal" fo:font-weight="normal" style:font-size-asian="8pt" style:font-size-complex="8pt" loext:padding="0cm" loext:border="none"/>
    </style:style>
    <style:style style:name="P5" style:family="paragraph" style:parent-style-name="Standard">
      <style:paragraph-properties fo:line-height="100%" fo:text-align="start" style:justify-single-word="false"/>
      <style:text-properties style:font-name="JetBrainsMono NF" fo:font-size="8pt" style:text-underline-style="solid" style:text-underline-width="auto" style:text-underline-color="font-color" style:font-size-asian="8pt" style:font-size-complex="8pt"/>
    </style:style>
    <style:style style:name="T1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0) Pre-flight: soy root y tengo <text:span text:style-name="T1">backup</text:span></text:h>
      <text:p text:style-name="P2">whoami cp -p /etc/fstab /etc/fstab.$(date +%F)</text:p>
      <text:p text:style-name="P3"/>
      <text:h text:style-name="P1" text:outline-level="1">1) Creo el directorio local (SLD)</text:h>
      <text:p text:style-name="P2">cd /usr/sap/SAPBusinessOne/B1_SHF/ mkdir -p Attachments ls -lhd Attachments</text:p>
      <text:p text:style-name="P3"/>
      <text:h text:style-name="P1" text:outline-level="1">2) Propietario correcto y permisos restrictivos</text:h>
      <text:p text:style-name="P2">chown -R b1service0:b1service0 Attachments/ chmod -R u=rwX,go=rX Attachments/ # 755 dirs, 644 files ls -lhd Attachments</text:p>
      <text:p text:style-name="P3"/>
      <text:h text:style-name="P1" text:outline-level="1">3) Creo el punto de montaje (misma secuencia, pero sin 777)</text:h>
      <text:p text:style-name="P2">cd /mnt mkdir -p Attachments chown b1service0:b1service0 Attachments chmod 755 Attachments ls -lhd Attachments</text:p>
      <text:p text:style-name="P3"/>
      <text:h text:style-name="P1" text:outline-level="1">4) Añado la línea al fstab (una sola vez)</text:h>
      <text:h text:style-name="P1" text:outline-level="1">Nota: sin 'noperm', con 'sec=ntlmssp' y '_netdev'</text:h>
      <text:p text:style-name="P2">echo '//sld/B1_SHF/Attachments /mnt/Attachments cifs _netdev,x-systemd.automount,sec=ntlmssp,vers=3.0,uid=b1service0,gid=b1service0,file_mode=0644,dir_mode=0755,iocharset=utf8 0 0' &gt;&gt;/etc/fstab</text:p>
      <text:p text:style-name="P3"/>
      <text:h text:style-name="P1" text:outline-level="1">5) Revisión visual (opcional)</text:h>
      <text:p text:style-name="P2">cat /etc/fstab</text:p>
      <text:p text:style-name="P3"/>
      <text:h text:style-name="P1" text:outline-level="1">6) Montaje y chequeo</text:h>
      <text:p text:style-name="P2">systemctl daemon-reload # fuerza a systemd a leer fstab mount -a -v # monta todo lo nuevo mount | grep Attachments # debe aparecer df -h | grep Attachments</text:p>
      <text:p text:style-name="P3"/>
      <text:h text:style-name="P1" text:outline-level="1">7) Prueba de escritura/lectura con el usuario B1</text:h>
      <text:p text:style-name="P2">touch /mnt/Attachments/test.B1 ls -l /mnt/Attachments/test.B1 # owner b1service0, perm 644 rm /mnt/Attachments/test.B1</text:p>
      <text:p text:style-name="P3"/>
      <text:p text:style-name="P4">Listo; el share ya está montado con permisos seguros y arrancará tras cada reinicio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0:09:26.554443900</meta:creation-date>
    <dc:date>2025-12-11T13:25:43.816886200</dc:date>
    <meta:editing-duration>P1DT3H5M59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8" meta:word-count="171" meta:character-count="1278" meta:non-whitespace-character-count="1125"/>
  </office:meta>
</office:document-meta>
</file>